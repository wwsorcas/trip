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a832e" officeooo:paragraph-rsid="001a832e"/>
    </style:style>
    <style:style style:name="P2" style:family="paragraph" style:parent-style-name="Standard">
      <style:text-properties officeooo:rsid="001af2bd" officeooo:paragraph-rsid="001af2bd"/>
    </style:style>
    <style:style style:name="P3" style:family="paragraph" style:parent-style-name="Standard">
      <style:text-properties officeooo:rsid="001cefba" officeooo:paragraph-rsid="001cefba"/>
    </style:style>
    <style:style style:name="P4" style:family="paragraph" style:parent-style-name="Standard">
      <style:text-properties officeooo:rsid="001d8074" officeooo:paragraph-rsid="001d8074"/>
    </style:style>
    <style:style style:name="P5" style:family="paragraph" style:parent-style-name="Standard">
      <style:text-properties officeooo:rsid="001f5631" officeooo:paragraph-rsid="001f5631"/>
    </style:style>
    <style:style style:name="P6" style:family="paragraph" style:parent-style-name="Standard">
      <style:text-properties officeooo:rsid="00206c3a" officeooo:paragraph-rsid="00206c3a"/>
    </style:style>
    <style:style style:name="P7" style:family="paragraph" style:parent-style-name="Standard">
      <style:text-properties officeooo:rsid="002114f1" officeooo:paragraph-rsid="002114f1"/>
    </style:style>
    <style:style style:name="P8" style:family="paragraph" style:parent-style-name="Standard">
      <style:text-properties officeooo:rsid="0021b806" officeooo:paragraph-rsid="0021b806"/>
    </style:style>
    <style:style style:name="T1" style:family="text">
      <style:text-properties officeooo:rsid="001af2bd"/>
    </style:style>
    <style:style style:name="T2" style:family="text">
      <style:text-properties officeooo:rsid="001d8074"/>
    </style:style>
    <style:style style:name="T3" style:family="text">
      <style:text-properties officeooo:rsid="0021b80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ood afternoon. I must start by thanking the organizers, Profs. Qian and Leung, for inviting me to speak in this session.</text:p>
      <text:p text:style-name="P1"/>
      <text:p text:style-name="P1">I will tell you a tale of two inverse problems, and their relation.</text:p>
      <text:p text:style-name="P1"/>
      <text:p text:style-name="P1">Both <text:span text:style-name="T1">problems </text:span>originate in the interpretation of wave data. The simplest useful model for such data is linear acoustics, in which pressure waves are generated by natural or artificial energy sources and measured at some distance away. A convenient description of acoustic wave physics is the given by the wave equation for a potential $q$. <text:span text:style-name="T1">The</text:span> time derivative <text:span text:style-name="T1">of $q$</text:span> is the pressure field <text:span text:style-name="T1">$p$.</text:span> With the isotropic point radiator with time dependence $f$ on the right hand side, <text:span text:style-name="T1">we have what Courant termed the radiation problem. In this model, the data is a collection of time history meaurements of $p$ at receiver locations $\bx_r$, parametrized by source locations $\bx_s$.</text:span></text:p>
      <text:p text:style-name="P1"/>
      <text:p text:style-name="P2">The objective of the inverse problem is the determination of the coefficients in the wave equation, which describe the spatially variable mechanics of the material through which the waves propagate. For simplicity, I’ll assume that the material density $\rho$ is known and independent of position, and that the source time dependence $f$ is also known. Then that remaining objective is to determine the bulk modulus field $\kappa$, or one of several equivalent fields.</text:p>
      <text:p text:style-name="P2"/>
      <text:p text:style-name="P2">There are lots of variants – try to determine $\rho$ and/or $f$ as well, use more complex sources and reeceivers with nontrivial radiation patterns, <text:s/>model energy absorption <text:s/>characteristic of real materials, and so on. The simple model I’ve just described will get us into enough trouble for this afternoon.</text:p>
      <text:p text:style-name="P2"/>
      <text:p text:style-name="P2">----------------</text:p>
      <text:p text:style-name="P2"/>
      <text:p text:style-name="P3">Here’s a 2D example that I’ll use throughout my talk; <text:span text:style-name="T2">these computational results are taken from a recent paper with Chen and Minkoff</text:span>. The left figure is a color-scale plot of a synthetic bulk modulus model, with a low-value zone in the center. Superimposed on the bulk modulus values are 20 source locations, in green, and 181 receiver locations, in blue. I’ll call the horizontal coordinge “x”, and the vertical coordinate “z”; the sources are located at x=3000 m, the receivers at x=5000 m. <text:span text:style-name="T2">The density is 1 gm/cm^3, and the pressure time history is a trapezoidal bandpass filter (that is, its Fourier transform has a trapezoidal graph) with corner points at 1, 2.5, 7.5, and 12.5 Hz. </text:span>The right-hand figure is a color-scale plot of the pressure histories for each combination of source and receiver position, <text:span text:style-name="T2">grouped by increasing source depth, and within each common source set by increasing receiver depth. Time increases downwards.</text:span></text:p>
      <text:p text:style-name="P3"/>
      <text:p text:style-name="P4">The salient feature of thiis plot is the “sag” in the middle: the first (highest) visible signal arrives later for sources in the middle of the source line (around 2 km depth) than at the sides.</text:p>
      <text:p text:style-name="P4"/>
      <text:p text:style-name="P4">------------</text:p>
      <text:p text:style-name="P4"/>
      <text:p text:style-name="P5">Geometric asymptotics explains this sag: in the limit of high temporal frequency, wavefronts are orthogonal surfaces to geodesic trajectories for a Riemannian metric related to the wave equation. The speed of geodesics, $c=\sqrt{\kappa/\rho}$, is also the speed with which wavefronts move. Since the bulk modulus in my example decreases in the center of the computational domain, and the density is constant, the speed is lower in the center, thus the wavefront takes longer <text:s/>to transit the region between source and receiver arrays: otherwise put, the geodesic distance between source and receiver points in the center is larger than it is on the edges.</text:p>
      <text:p text:style-name="P5"/>
      <text:p text:style-name="P5"><text:soft-page-break/>Early in the last century, this connection between waves and geodesics (or rays) led to the formulation of a different inverse problem: if one measures the time of travel of a wave between sets of points, one has another set of data that constrains the coefficients in the wave equation. Since the early work of Herglotz, Weichert, and others on seismic travel time inversion, this category of kinematic inverse problem has received lots of attention. For example, boundary rigidity: does the geodesic distance between boundary points of a Riemannian manifold with boundary determine the metric? (The answer is: sometimes!)</text:p>
      <text:p text:style-name="P5"/>
      <text:p text:style-name="P6">One complication, to which I’ll return later: multiple geodesics may connect source and receiver points, so that there are multiple geodesic distances (and correspondingly multiple wavefronts moving from source to receiver).</text:p>
      <text:p text:style-name="P6"/>
      <text:p text:style-name="P6">----------------</text:p>
      <text:p text:style-name="P6"/>
      <text:p text:style-name="P7">As for many other inverse problems in science and engineering, the dynamic and kinematic inverse problems for waves have been formulated as nonlinear least squares problems. <text:span text:style-name="T3">For the dynamic problem, the task becomes minimization of the mean square (over time and source/receiver pairs) of the difference between measured pressure and pressure predicted by solveing the wave equation with a trial bulk modulus field. For the kinematic problem, minimize the mean square (over source-receiver pairs) of the difference between measured and predicted travel times. Solution requires choice of numerical method for prediction of presure, resp. travelltime. Also, practical versions incorporate various regularizations and constraints (bulk moduli and sound velocity values are positive…) which I’ve suppressed here.</text:span></text:p>
      <text:p text:style-name="P7"/>
      <text:p text:style-name="P8">Current nomenclature is “full waveform inversion” for the dynamic problem, “traaveltime tomography” for the kinematic problem.</text:p>
      <text:p text:style-name="P8"/>
      <text:p text:style-name="P8">-----------------</text:p>
      <text:p text:style-name="P6"/>
      <text:p text:style-name="P6"/>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11T16:57:11.714627000</meta:creation-date>
    <dc:date>2026-06-18T09:03:52.306965000</dc:date>
    <meta:editing-duration>PT40M10S</meta:editing-duration>
    <meta:editing-cycles>1</meta:editing-cycles>
    <meta:document-statistic meta:table-count="0" meta:image-count="0" meta:object-count="0" meta:page-count="2" meta:paragraph-count="16" meta:word-count="824" meta:character-count="5267" meta:non-whitespace-character-count="4455"/>
    <meta:generator>LibreOffice/26.2.1.2$MacOSX_AARCH64 LibreOffice_project/8399f6259d8c87f40e7255cdb3c9b958f5e08948</meta:generator>
  </office:meta>
</office:document-meta>
</file>