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1a832e" officeooo:paragraph-rsid="001a832e"/>
    </style:style>
    <style:style style:name="P2" style:family="paragraph" style:parent-style-name="Standard">
      <style:text-properties officeooo:rsid="001a832e" officeooo:paragraph-rsid="002c869e"/>
    </style:style>
    <style:style style:name="P3" style:family="paragraph" style:parent-style-name="Standard">
      <style:text-properties officeooo:rsid="001af2bd" officeooo:paragraph-rsid="001af2bd"/>
    </style:style>
    <style:style style:name="P4" style:family="paragraph" style:parent-style-name="Standard">
      <style:text-properties officeooo:rsid="001cefba" officeooo:paragraph-rsid="002909c1"/>
    </style:style>
    <style:style style:name="P5" style:family="paragraph" style:parent-style-name="Standard">
      <style:text-properties officeooo:rsid="001d8074" officeooo:paragraph-rsid="001d8074"/>
    </style:style>
    <style:style style:name="P6" style:family="paragraph" style:parent-style-name="Standard">
      <style:text-properties officeooo:rsid="001f5631" officeooo:paragraph-rsid="001f5631"/>
    </style:style>
    <style:style style:name="P7" style:family="paragraph" style:parent-style-name="Standard">
      <style:text-properties officeooo:rsid="00206c3a" officeooo:paragraph-rsid="00206c3a"/>
    </style:style>
    <style:style style:name="P8" style:family="paragraph" style:parent-style-name="Standard">
      <style:text-properties officeooo:rsid="002114f1" officeooo:paragraph-rsid="002114f1"/>
    </style:style>
    <style:style style:name="P9" style:family="paragraph" style:parent-style-name="Standard">
      <style:text-properties officeooo:rsid="0021b806" officeooo:paragraph-rsid="0021b806"/>
    </style:style>
    <style:style style:name="P10" style:family="paragraph" style:parent-style-name="Standard">
      <style:text-properties officeooo:rsid="00237c48" officeooo:paragraph-rsid="00237c48"/>
    </style:style>
    <style:style style:name="P11" style:family="paragraph" style:parent-style-name="Standard">
      <style:text-properties officeooo:rsid="00237c48" officeooo:paragraph-rsid="00279807"/>
    </style:style>
    <style:style style:name="P12" style:family="paragraph" style:parent-style-name="Standard">
      <style:text-properties officeooo:rsid="00279807" officeooo:paragraph-rsid="002909c1"/>
    </style:style>
    <style:style style:name="P13" style:family="paragraph" style:parent-style-name="Standard">
      <style:text-properties officeooo:rsid="00279807" officeooo:paragraph-rsid="00279807"/>
    </style:style>
    <style:style style:name="P14" style:family="paragraph" style:parent-style-name="Standard">
      <style:text-properties officeooo:rsid="00237c48" officeooo:paragraph-rsid="0027c307"/>
    </style:style>
    <style:style style:name="P15" style:family="paragraph" style:parent-style-name="Standard">
      <style:text-properties officeooo:rsid="00252d0b" officeooo:paragraph-rsid="0027c307"/>
    </style:style>
    <style:style style:name="P16" style:family="paragraph" style:parent-style-name="Standard">
      <style:text-properties officeooo:rsid="002909c1" officeooo:paragraph-rsid="002909c1"/>
    </style:style>
    <style:style style:name="P17" style:family="paragraph" style:parent-style-name="Standard">
      <style:text-properties officeooo:rsid="002f28e6" officeooo:paragraph-rsid="002f28e6"/>
    </style:style>
    <style:style style:name="P18" style:family="paragraph" style:parent-style-name="Standard">
      <style:text-properties officeooo:rsid="00307184" officeooo:paragraph-rsid="00307184"/>
    </style:style>
    <style:style style:name="P19" style:family="paragraph" style:parent-style-name="Standard">
      <style:text-properties officeooo:rsid="003170d1" officeooo:paragraph-rsid="003170d1"/>
    </style:style>
    <style:style style:name="P20" style:family="paragraph" style:parent-style-name="Standard">
      <style:text-properties officeooo:rsid="0032c395" officeooo:paragraph-rsid="0032c395"/>
    </style:style>
    <style:style style:name="P21" style:family="paragraph" style:parent-style-name="Standard">
      <style:text-properties fo:font-weight="bold" officeooo:rsid="0032c395" officeooo:paragraph-rsid="0032c395" style:font-weight-asian="bold" style:font-weight-complex="bold"/>
    </style:style>
    <style:style style:name="P22" style:family="paragraph" style:parent-style-name="Standard">
      <style:text-properties fo:font-weight="bold" officeooo:rsid="0034719a" officeooo:paragraph-rsid="0034719a" style:font-weight-asian="bold" style:font-weight-complex="bold"/>
    </style:style>
    <style:style style:name="P23" style:family="paragraph" style:parent-style-name="Standard">
      <style:text-properties officeooo:rsid="0034719a" officeooo:paragraph-rsid="0034719a"/>
    </style:style>
    <style:style style:name="P24" style:family="paragraph" style:parent-style-name="Standard">
      <style:text-properties fo:font-weight="normal" officeooo:rsid="0034ad67" officeooo:paragraph-rsid="0034ad67" style:font-weight-asian="normal" style:font-weight-complex="normal"/>
    </style:style>
    <style:style style:name="P25" style:family="paragraph" style:parent-style-name="Standard">
      <style:text-properties officeooo:rsid="0034ad67" officeooo:paragraph-rsid="0034ad67"/>
    </style:style>
    <style:style style:name="P26" style:family="paragraph" style:parent-style-name="Standard">
      <style:text-properties officeooo:rsid="00363cb9" officeooo:paragraph-rsid="00363cb9"/>
    </style:style>
    <style:style style:name="P27" style:family="paragraph" style:parent-style-name="Standard">
      <style:text-properties officeooo:rsid="0037ee74" officeooo:paragraph-rsid="0037ee74"/>
    </style:style>
    <style:style style:name="P28" style:family="paragraph" style:parent-style-name="Standard">
      <style:text-properties officeooo:rsid="0037ee74" officeooo:paragraph-rsid="003b1215"/>
    </style:style>
    <style:style style:name="P29" style:family="paragraph" style:parent-style-name="Standard">
      <style:text-properties officeooo:rsid="00397616" officeooo:paragraph-rsid="00397616"/>
    </style:style>
    <style:style style:name="T1" style:family="text">
      <style:text-properties officeooo:rsid="002c869e"/>
    </style:style>
    <style:style style:name="T2" style:family="text">
      <style:text-properties officeooo:rsid="001af2bd"/>
    </style:style>
    <style:style style:name="T3" style:family="text">
      <style:text-properties officeooo:rsid="003a2e30"/>
    </style:style>
    <style:style style:name="T4" style:family="text">
      <style:text-properties officeooo:rsid="002a01b1"/>
    </style:style>
    <style:style style:name="T5" style:family="text">
      <style:text-properties officeooo:rsid="002ad209"/>
    </style:style>
    <style:style style:name="T6" style:family="text">
      <style:text-properties officeooo:rsid="001d8074"/>
    </style:style>
    <style:style style:name="T7" style:family="text">
      <style:text-properties officeooo:rsid="002909c1"/>
    </style:style>
    <style:style style:name="T8" style:family="text">
      <style:text-properties officeooo:rsid="002e85ac"/>
    </style:style>
    <style:style style:name="T9" style:family="text">
      <style:text-properties officeooo:rsid="0021b806"/>
    </style:style>
    <style:style style:name="T10" style:family="text">
      <style:text-properties officeooo:rsid="00285da9"/>
    </style:style>
    <style:style style:name="T11" style:family="text">
      <style:text-properties officeooo:rsid="00237c48"/>
    </style:style>
    <style:style style:name="T12" style:family="text">
      <style:text-properties officeooo:rsid="0025a603"/>
    </style:style>
    <style:style style:name="T13" style:family="text">
      <style:text-properties officeooo:rsid="00279807"/>
    </style:style>
    <style:style style:name="T14" style:family="text">
      <style:text-properties officeooo:rsid="0027c307"/>
    </style:style>
    <style:style style:name="T15" style:family="text">
      <style:text-properties officeooo:rsid="00252d0b"/>
    </style:style>
    <style:style style:name="T16" style:family="text">
      <style:text-properties officeooo:rsid="002919ab"/>
    </style:style>
    <style:style style:name="T17" style:family="text">
      <style:text-properties officeooo:rsid="00307184"/>
    </style:style>
    <style:style style:name="T18" style:family="text">
      <style:text-properties fo:font-style="italic" style:font-style-asian="italic" style:font-style-complex="italic"/>
    </style:style>
    <style:style style:name="T19" style:family="text">
      <style:text-properties officeooo:rsid="003b1215"/>
    </style:style>
    <style:style style:name="T20" style:family="text">
      <style:text-properties fo:font-weight="normal" style:font-weight-asian="normal" style:font-weight-complex="normal"/>
    </style:style>
    <style:style style:name="T21" style:family="text">
      <style:text-properties officeooo:rsid="003b5cc2"/>
    </style:style>
    <style:style style:name="T22" style:family="text">
      <style:text-properties officeooo:rsid="0039761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ood afternoon. I must start by thanking the organizers, Profs. Qian and Leung, for inviting me to speak in this session.</text:p>
      <text:p text:style-name="P1"/>
      <text:p text:style-name="P1">I’<text:span text:style-name="T1">m going to</text:span> tell you a tale of two inverse problems, and their relation.</text:p>
      <text:p text:style-name="P1"/>
      <text:p text:style-name="P2">Both <text:span text:style-name="T2">problems </text:span>originate in the interpretation of <text:span text:style-name="T1">acoustic </text:span>wave data. <text:span text:style-name="T3">Spatially </text:span><text:span text:style-name="T1">localized </text:span>natural or artificial energy sources <text:span text:style-name="T1">generate p</text:span>ressure waves, <text:span text:style-name="T1">and </text:span><text:span text:style-name="T3">spatially local </text:span><text:span text:style-name="T1">receiver devices measure pressure some distance away. </text:span>A convenient description of acoustic wave physics is the wave equation for a potential $q$. <text:span text:style-name="T2">The</text:span> time derivative <text:span text:style-name="T2">of $q$</text:span> is the pressure field <text:span text:style-name="T2">$p$.</text:span> With the isotropic point radiator with time dependence $f$ on the right hand side, <text:span text:style-name="T2">we have what Courant termed the radiation problem. In this model, the data is a collection of time history meaurements of $p$ at receiver locations $\bx_r$, parametrized by source locations $\bx_s$.</text:span></text:p>
      <text:p text:style-name="P1"/>
      <text:p text:style-name="P3">The objective of th<text:span text:style-name="T3">is </text:span>inverse problem is the determination of coefficients in the wave equation, <text:span text:style-name="T4">so that its solution predicts the measured </text:span><text:span text:style-name="T3">pressure </text:span><text:span text:style-name="T4">data</text:span>. For simplicity, I’ll assume that the material density $\rho$ is known and independent of position, and that the source time dependence $f$ is also known. The <text:span text:style-name="T5">remaining coefficient is </text:span>bulk modulus field $\kappa$, <text:span text:style-name="T5">assumed smooth and bounded</text:span>. <text:span text:style-name="T5">For every choice of $\kappa$, solving the wave equation yields pressure fields $p$. The inverse problem is to choose $\kappa$ so that the time histories of $p$ for all the source-receiver pairs match given data histories. </text:span></text:p>
      <text:p text:style-name="P3"/>
      <text:p text:style-name="P3">There are lots of variants – try to determine $\rho$ and/or $f$ as well, use more complex sources and reeceivers with nontrivial radiation patterns, <text:s/>model energy absorption characteristic<text:span text:style-name="T5">s</text:span> of real materials, and so on. The simple model I’ve just described will get us into enough trouble for this afternoon.</text:p>
      <text:p text:style-name="P3"/>
      <text:p text:style-name="P3">----------------</text:p>
      <text:p text:style-name="P3"/>
      <text:p text:style-name="P4">Here’s a 2D example that I’ll use throughout my talk; <text:span text:style-name="T6">these computational results are </text:span><text:span text:style-name="T3">all </text:span><text:span text:style-name="T6">taken from a recent paper with Chen and Minkoff, </text:span><text:span text:style-name="T3">which appeared last year in Inverse Problems</text:span>. The left figure is a color-scale plot of a synthetic bulk modulus model, with a low-value zone in the center. Superimposed on the bulk modulus values are 20 source locations, in green, and 181 receiver locations, in blue. I’ll call the horizontal coordinge “x”, and the vertical coordinate “z”; the sources are located <text:span text:style-name="T3">on the vertical line </text:span>at x=3000 m, the receivers at x=5000 m. <text:span text:style-name="T6">The density is 1 gm/cm^3, and the pressure time history is a trapezoidal bandpass filter (that is, its Fourier transform has a trapezoidal graph) with corner </text:span><text:span text:style-name="T3">frequencie</text:span><text:span text:style-name="T6">s at 1, 2.5, 7.5, and 12.5 Hz. </text:span><text:span text:style-name="T7">We used a finite difference method to solve the wave equation </text:span><text:span text:style-name="T8">(approximately)</text:span><text:span text:style-name="T7">.</text:span></text:p>
      <text:p text:style-name="P4"/>
      <text:p text:style-name="P4">The right-hand figure is a color-scale plot of the pressure histories for each combination of source and receiver position, <text:span text:style-name="T6">grouped by increasing source depth, and within each common source set by increasing receiver depth. Time increases downwards. The salient feature of this plot is the “sag” in the middle: the first (highest) visible signal arrives later for sources in the middle of the source line (around 2 km depth) than at the sides.</text:span></text:p>
      <text:p text:style-name="P5"/>
      <text:p text:style-name="P5">------------</text:p>
      <text:p text:style-name="P5"/>
      <text:p text:style-name="P6">Geometric asymptotics explains this sag: in the limit of high temporal frequency, wavefronts are orthogonal surfaces to geodesic trajectories for a Riemannian metric related to the wave equation. The speed of geodesics, $c=\sqrt{\kappa/\rho}$, is also the speed with which wavefronts move. Since the bulk modulus in my example decreases in the center of the computational domain, and the density is <text:soft-page-break/>constant, the speed is lower in the center, thus the wavefront takes longer <text:s/>to transit the region between source and receiver arrays: otherwise put, the geodesic distance between source and receiver points in the center is larger than it is on the edges.</text:p>
      <text:p text:style-name="P6"/>
      <text:p text:style-name="P6">Early in the last century, this connection between waves and geodesics (or rays) led to the formulation of a different inverse problem: if one measures the time of travel of a wave between sets of points, one has another set of data that constrains the coefficients in the wave equation. Since the early work of Herglotz, Weichert, and others on seismic travel time inversion, this category of kinematic inverse problem has received lots of attention. For example, boundary rigidity: does the geodesic distance between boundary points of a Riemannian manifold with boundary determine the metric? (The answer is: sometimes!)</text:p>
      <text:p text:style-name="P6"/>
      <text:p text:style-name="P7">One complication, to which I’ll return later: multiple geodesics may connect source and receiver points, so that there are multiple geodesic distances (and correspondingly multiple wavefronts moving from source to receiver).</text:p>
      <text:p text:style-name="P7"/>
      <text:p text:style-name="P7">----------------</text:p>
      <text:p text:style-name="P7"/>
      <text:p text:style-name="P8"><text:span text:style-name="T7">Like lots of </text:span>other inverse problems in science and engineering, the dynamic and kinematic inverse problems for waves have been formulated as nonlinear least squares problems. <text:span text:style-name="T9">For the dynamic problem, the task becomes minimization of the mean square (over time and source/receiver pairs) of the difference between measured pressure and pressure predicted by solving the wave equation with a trial bulk modulus field. For the kinematic problem, minimize the mean square (over source-receiver pairs) of the difference between measured and predicted travel times. Solution requires choice of numerical method for prediction of pres</text:span><text:span text:style-name="T10">s</text:span><text:span text:style-name="T9">ure, resp. travel time. </text:span><text:span text:style-name="T11">For pressure, a variety of finite difference or finite element methods are available, and are nowadays practical in 3D at field scale. For travel time, ODE solvers can compute geodesics; alternatively, methods adapted from CFD can calculate the travel time via solution of the eikonal equation.</text:span><text:span text:style-name="T9"> Also, practical versions incorporate various regularizations and constraints (bulk moduli and sound velocity values are positive…) which I’ve suppressed here.</text:span></text:p>
      <text:p text:style-name="P8"/>
      <text:p text:style-name="P9">Current nomenclature is “full waveform inversion” <text:span text:style-name="T11">(FWI) </text:span>for the dynamic problem, “traaveltime tomography” <text:span text:style-name="T11">(TT) </text:span>for the kinematic problem.</text:p>
      <text:p text:style-name="P9"/>
      <text:p text:style-name="P9">-----------------</text:p>
      <text:p text:style-name="P9"/>
      <text:p text:style-name="P10">The FWI problem has two salient features, one obvious, one not. The obvious feature is that its data (the pressure histories recorded at the receivers) are (models of) the primary data collected in the field: the receivers are microphones, accelerometers, and similar instruments that record pressure or some related quantity. That’s an advantage, in that the data don’t have to be converted into something else.</text:p>
      <text:p text:style-name="P10"/>
      <text:p text:style-name="P11">The other feature, discovered in the mid-80’s when FWI was first seriously tried out: the FWI objective, as function of bulk modulus or its equivalent, is highly sensitive to data frequency. <text:span text:style-name="T12">For high-frequency data, only </text:span>local optimization method<text:span text:style-name="T12">s</text:span> <text:span text:style-name="T12">are feasible due to necessarily fine discretization and problem size, but these </text:span>tend to stagnate at unsatisfactory estimates of bulk modulus. <text:span text:style-name="T13">This misbehaviour has come to be called “cycle-skipping”, after a poetic description of the mechanism. </text:span></text:p>
      <text:p text:style-name="P11"/>
      <text:p text:style-name="P11">A scale-free meaning of “high frequency” is something like “distance from source to receiver is 10’s of wavelenghts at a significantly energetic frequency”, and that certainly describes most application <text:soft-page-break/>settings. It’s widely believed that the <text:span text:style-name="T13">least-squares </text:span>objective has local minima in such cases, but that’s only been proven in very limited settings.</text:p>
      <text:p text:style-name="P10"/>
      <text:p text:style-name="P10"/>
      <text:p text:style-name="P10"/>
      <text:p text:style-name="P10">-----------------------------------------</text:p>
      <text:p text:style-name="P10"/>
      <text:p text:style-name="P12">Here’s an example, based on the model and data that you’ve already seen. If you start LBFGS iteration, <text:span text:style-name="T7">a widely usd qu</text:span><text:span text:style-name="T3">a</text:span><text:span text:style-name="T7">si-Newton local optimization method,</text:span> at the background value of $\kappa$, so constant in space at 4 Gpa, two hundred iterations reduces the L2 norm of the error by a bit more than half, but it’s apparently stalled, and the estimated bulk modulus is very far from the model that produced the data. This is typical cycle-skipping behaviour.</text:p>
      <text:p text:style-name="P13"/>
      <text:p text:style-name="P13">-----------------------------------------</text:p>
      <text:p text:style-name="P13"/>
      <text:p text:style-name="P10"/>
      <text:p text:style-name="P14"><text:span text:style-name="T14">The good news </text:span><text:span text:style-name="T4">about trave</text:span><text:span text:style-name="T3">l</text:span><text:span text:style-name="T4"> time inversion</text:span><text:span text:style-name="T14"> is that </text:span><text:span text:style-name="T4">t</text:span><text:span text:style-name="T15">he least-squares formulation is obviously not frequency dependent – and the mapping from velocity or bulk modulus field to travel time data is not just smooth in reasonable senses but stable, according to recent work by </text:span><text:span text:style-name="T12">Tarikere and Zhou ‘</text:span><text:span text:style-name="T13">24: that is, difference in travel time bounds difference in velocity fields, measured appropriately. This strong result isn’t enough to rule out multiple stationary points of the least-squares error function, but it’s widely believed that they don’t exist, or don’t occur in practice.</text:span></text:p>
      <text:p text:style-name="P15"/>
      <text:p text:style-name="P15"><text:span text:style-name="T14">On the other hand, travel time</text:span> data are not the primary result of wave recordings: arrival times must be inferred from waveform recordings. This inference (called “picking” in seismology) is itself an interesting problem, that’s received a lot of attention – in some applications, travel time picking is largely automated. Still, times are not the primary data.</text:p>
      <text:p text:style-name="P15"/>
      <text:p text:style-name="P16">These observations lead to a common approach to waveform inversion: begin by picking time data, then <text:span text:style-name="T4">adjust the wave velocity field to </text:span>fit it by <text:span text:style-name="T4">nonlinear </text:span>least-squares. Use the result as the initial guess for least squares waveform inversion (FWI), employing low-to-high frequency continuation and other regularizations and constraints to enhance the chances of success. <text:s/><text:span text:style-name="T16">This approach works well enough in practice, but the question remains: is there an alternative to least-squares inversion that implicitly </text:span><text:span text:style-name="T17">includes</text:span><text:span text:style-name="T16"> traveltime inversion, and so avoids cycle-skipping? </text:span><text:span text:style-name="T17">Such a dynamic inversion method would be “approximately kinematic”.</text:span></text:p>
      <text:p text:style-name="P16"/>
      <text:p text:style-name="P17">Spoiler: the answer is “yes, sometimes”</text:p>
      <text:p text:style-name="P16"/>
      <text:p text:style-name="P16">-------------------------</text:p>
      <text:p text:style-name="P16"/>
      <text:p text:style-name="P18">Adaptive Waveform Inversion (AWI) is a modification of FWI that in some circumstances is approximately kinematic. AWI is the brainchild of Mike Warner of Imperial College London and his co-workers, and begins with the observation that FWI fails when initial $\kappa$ (or $c$) places waves in predicted data at wrong times, in error by more that half a wavelength. The AWI idea is: <text:span text:style-name="T18">so move them</text:span>. Warner uses a so-called adaptive filter to move waves to correct times. The filter matches the predicted data to the measured data, via least squares fit (sometimes called Wiener filtering). Thihonov regularization is needed because the data is necessarily smooth, therefore itself defines a non-invertible filter.</text:p>
      <text:p text:style-name="P18"/>
      <text:p text:style-name="P18"><text:soft-page-break/>Note that $*$ denotes convolution in $t$, so there is an independent filter for each source-receiver pair.</text:p>
      <text:p text:style-name="P18">------------------------</text:p>
      <text:p text:style-name="P18"/>
      <text:p text:style-name="P18">Here’s an example based on the data you’ve already seen, very close to the top right plot. The top left plot is the predicted data for the spatially constant bulk modulus $\kappa_0 = 4$ GPa, used as the initial model in the least squares inversion shown previously. You can see that many time traces in each source panel need to be shifted downward considerably to match the top right data. The bottom plot shows the set of filters obtained by solving the least squares problem on the previous slide by conjugate gradient iteration, with a small regularization weight $\sigma$. The error between the filtered data (top right) and the data shown previously is a few percent. So indeed the adaptive filter moves the waves to match the data.</text:p>
      <text:p text:style-name="P18"/>
      <text:p text:style-name="P18">--------------------</text:p>
      <text:p text:style-name="P18"/>
      <text:p text:style-name="P19">Well that’s all very well, but we’ve matched the data at the price of using the wrong model. The dynamic inverse problem asks for $\kappa$ so that $p[\kappa] \approx d$, whereas we’ve added the adaptive filter $u$ to the model and achieved $p[\kappa]*u \approx d$. These two goals coincide when $u = \delta$, so Warner proposed to adjust $u$ to make it approximate $\delta(t)$. Since $t\delta(t)=0$, one way to do this is to minimize the L2 norm of $tu$. Normalizing to eliminate the effect of unit choices etc, this idea is captured in the AWI objective function: <text:span text:style-name="T19">the quotient of norm tu squared by norm u squared.</text:span></text:p>
      <text:p text:style-name="P19"/>
      <text:p text:style-name="P19">Minimizing $J_{\rm AWI}$ (as usual with additional regularizations and constraints) has been quite successful in avoiding cycle skipping, often as a precursor to ordinary FWI, in place of travel-time inversion. The obvious question: exactly why should this work? </text:p>
      <text:p text:style-name="P15"/>
      <text:p text:style-name="P19">Since AWI appears to achieve the goal of travel time inversion, there must be some link, and that could only run through high frequency asymptotics. In fact, under some circumstances, the AWI objective function is asymptotic to the mean square travel time error as data wavelength tends to zero.</text:p>
      <text:p text:style-name="P19"/>
      <text:p text:style-name="P19">------------------------</text:p>
      <text:p text:style-name="P10"/>
      <text:p text:style-name="P20">I’ll spend the next few slides explaining this rather remarkable result, which connects computations purely based on waves with travel time error. There are a number of assumptions that must be met for this conclusion to hold, of which the most important is the first:</text:p>
      <text:p text:style-name="P20"/>
      <text:p text:style-name="P21">For all wave velocity (or bulk modulus) fields occurring during the computation, and the one generating the data, the corresponding metric is simple: all source-receiver pairs are connected by a unique geodesic</text:p>
      <text:p text:style-name="P20"/>
      <text:p text:style-name="P20">The other assumptions can be weakened somewhat, but are convenient:</text:p>
      <text:p text:style-name="P20"/>
      <text:p text:style-name="P22">Once a geodesic leaves a neightborhood of the set of sources and receivers X_sr, it never returns</text:p>
      <text:p text:style-name="P23"/>
      <text:p text:style-name="P22">Solutions of the wave equation with data of compact support near X_sr decay exponentially in time (implied by “non-trapping” property: all geodesics go to infinity, B. Vainberg ‘75)</text:p>
      <text:p text:style-name="P23"/>
      <text:p text:style-name="P22">express asymptotics via family of source time functions f_{\lambda}=…, f_1 \in \partial^2C_...</text:p>
      <text:p text:style-name="P23"/>
      <text:p text:style-name="P22"><text:soft-page-break/>data is noise-free: $d_\lambda^* = p_\lambda[\kappa^*]$</text:p>
      <text:p text:style-name="P24">------------------------</text:p>
      <text:p text:style-name="P24"/>
      <text:p text:style-name="P24">Under these assumptions, we reach two conclusions: first, for the residual $\|p_lam*u_sig – d_lam\|$ to remain small relative to \|d<text:span text:style-name="T19">_lam</text:span>\|, the ratio of the regularization weight sigma and wavelength $\lambda$ has to remain bounded above and below as lambda tends to zero. That is, the concept of AWI implies a relation between regularization <text:span text:style-name="T19">weight </text:span>and wavelength!</text:p>
      <text:p text:style-name="P24"/>
      <text:p text:style-name="P25"><text:span text:style-name="T20">Second, $t u_sig(\kappa, d_lam) \L^2$ so the AWI objective makes sense, and if you compute the travel-time mean square error using travel-time data for the target \kappa^*, then the difference between </text:span>the AWI and travel time objective functions is big-O(lam^2).</text:p>
      <text:p text:style-name="P25"/>
      <text:p text:style-name="P25">That is, the AWI objective is asymptotic to the travel-time objective in the high-frequency limit.</text:p>
      <text:p text:style-name="P25"/>
      <text:p text:style-name="P25">---------------------------</text:p>
      <text:p text:style-name="P25"/>
      <text:p text:style-name="P26">Here’s a quick sketch of the proof. It starts with the Hadamard expansion of the radiation field, introduced by Hadamard in the 19<text:span text:style-name="T19">2</text:span>0’s and developed over the intervening century by a number of authors, including our session organizers. In a simple metric domain (or normal neighborhood) of any source point, the potential is a <text:span text:style-name="T19">sum of two terms:</text:span> the source time function shifted in time by the travel time and scaled by a positive amplitude, and a remainder <text:span text:style-name="T19">that</text:span> integrates the source against a smooth kernel and is therefore relatively small if the source is highly oscillatory. This expansion is generally local in time as well, but the “no return” hypothesis makes it global in time.</text:p>
      <text:p text:style-name="P23"/>
      <text:p text:style-name="P26">If we neglect the remainder for the moment, we get this expression for the pressure.</text:p>
      <text:p text:style-name="P26"/>
      <text:p text:style-name="P26">----------------------------------</text:p>
      <text:p text:style-name="P26"/>
      <text:p text:style-name="P26">Using the same approximation for the target data $d^* = p[\kappa^*]$, we get a block-diagonal convolution least squares problem for u_sig, easily solvable by Fourier transform. The filter u_sigma is a scaled and shifted copy of a fixed filter g_sigma, with the time shift this time being the difference of the travel times for the trial \kappa and the target \kappa^* (so the travel time error has already shown up!). Note that g_sig is even, since its FT is real.</text:p>
      <text:p text:style-name="P26"/>
      <text:p text:style-name="P26">----------------------------------</text:p>
      <text:p text:style-name="P26"/>
      <text:p text:style-name="P27">For a particular source-receiver pair, because g_sig is even, the linear (in t) term in the expansion of \|tu_sig\| vanishes, leaving the squared travel time difference scaled by some factors and the norm squared of tg_sig. The norm squared of u_sig is just the same factors times the norm squared of g_sig. The quotient cancels <text:s/>these factors, leaving the squared travel time error plus the a remaineder which is easily seen to be O(\lambda^2). Summing over source-receiver pairs, obtain the conclusion.</text:p>
      <text:p text:style-name="P27"/>
      <text:p text:style-name="P28">Of course, that’s not <text:span text:style-name="T21">the whole story</text:span>, since we have completely neglected the remainder in the Hadamard expansion. <text:span text:style-name="T19">M</text:span>y 2024 arXiv preprint <text:span text:style-name="T19">shows an</text:span> O(\lambda^2) estimate for the <text:span text:style-name="T19">neglected contributions</text:span>.</text:p>
      <text:p text:style-name="P27"/>
      <text:p text:style-name="P27">I want to point out that an early version of this argument appeared in Hua Song’s 1994 thesis, concerning a slightly different formulation of the same inverse problem.</text:p>
      <text:p text:style-name="P27"/>
      <text:p text:style-name="P27"><text:soft-page-break/>------------------</text:p>
      <text:p text:style-name="P23"/>
      <text:p text:style-name="P23"/>
      <text:p text:style-name="P27">Here is a numerical example based on the data that you have seen several times. On the left is the result of 12 LBFGS iteration applied to the Matched Source objective function, <text:span text:style-name="T22">with the same initial estimate $\kappa_0=4$ Gpa as in the least squares example</text:span>; this thing is just the numerator in the AWI definition, that is, \|tu_sig\|^2, and has similar local asymptotics. On the right is the residual at the approximate solution. Its L2 norm is about 7% of that of the data.</text:p>
      <text:p text:style-name="P27"/>
      <text:p text:style-name="P27">-------------------</text:p>
      <text:p text:style-name="P27"/>
      <text:p text:style-name="P29">On this slide, the left plot is the filter u_sig required to fit the data for the initial bulk modulus $\kappa_0$ to the data. On the right is the filter computed from the inverted model shown in the previous slide. The time shifts have been almost entirely removed, showing that this result (using a close relative of AWI) has produced a model that matches travel times – without actually identifying or computing travel times. In other words, this is an approximately kinematic inversion.</text:p>
      <text:p text:style-name="P29"/>
      <text:p text:style-name="P29">----------------------</text:p>
      <text:p text:style-name="P7"/>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6-11T16:57:11.714627000</meta:creation-date>
    <dc:date>2026-06-24T07:48:50.112834000</dc:date>
    <meta:editing-duration>PT7H30M51S</meta:editing-duration>
    <meta:editing-cycles>6</meta:editing-cycles>
    <meta:generator>LibreOffice/26.2.1.2$MacOSX_AARCH64 LibreOffice_project/8399f6259d8c87f40e7255cdb3c9b958f5e08948</meta:generator>
    <meta:document-statistic meta:table-count="0" meta:image-count="0" meta:object-count="0" meta:page-count="6" meta:paragraph-count="61" meta:word-count="2664" meta:character-count="17032" meta:non-whitespace-character-count="14417"/>
  </office:meta>
</office:document-meta>
</file>